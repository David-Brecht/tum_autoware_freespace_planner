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in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 fo:wrap-option="no-wrap"/>
      <style:text-properties style:font-name="Liberation Sans"/>
    </style:style>
    <style:style style:name="ce13" style:family="table-cell" style:parent-style-name="Default">
      <style:table-cell-properties fo:background-color="#b2b2b2" fo:wrap-option="no-wrap"/>
      <style:text-properties style:font-name="Liberation Sans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font-name="Liberation Sans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10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Freespace Params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CPP App</text:p>
          </table:table-cell>
          <table:table-cell/>
          <table:table-cell table:style-name="ce11" office:value-type="string" calcext:value-type="string">
            <text:p>Explanation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nfigurations common to the all planners</text:p>
          </table:table-cell>
          <table:table-cell table:style-name="ce6" table:number-columns-repeated="3"/>
          <table:table-cell table:style-name="ce12"/>
          <table:table-cell table:style-name="ce16" table:number-columns-repeated="11"/>
        </table:table-row>
        <table:table-row table:style-name="ro1">
          <table:table-cell table:style-name="ce3" office:value-type="string" calcext:value-type="string">
            <text:p>Base configs</text:p>
          </table:table-cell>
          <table:table-cell table:style-name="ce7" table:number-columns-repeated="3"/>
          <table:table-cell table:style-name="ce13"/>
          <table:table-cell table:style-name="ce17" table:number-columns-repeated="1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float" office:value="30000" calcext:value-type="float">
            <text:p>300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4" office:value-type="string" calcext:value-type="string">
            <text:p>[ms] - Hard deadline for A* search; planning aborts if exceed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_turning_ratio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7" calcext:value-type="float">
            <text:p>0.7</text:p>
          </table:table-cell>
          <table:table-cell/>
          <table:table-cell table:style-name="ce14" office:value-type="string" calcext:value-type="string">
            <text:p>Fraction of max steering angle the planner may use. 1.0 = full lock, 0.5 = half — limits how tight turns 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ning_step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Number of discrete steering levels between straight and max steer (each direction). Total steering choices = 2×turning_steps+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earch configs</text:p>
          </table:table-cell>
          <table:table-cell table:style-name="ce7" table:number-columns-repeated="3"/>
          <table:table-cell table:style-name="ce13"/>
          <table:table-cell table:style-name="ce17" table:number-columns-repeated="11"/>
        </table:table-row>
        <table:table-row table:style-name="ro1">
          <table:table-cell office:value-type="string" calcext:value-type="string">
            <text:p>theta_size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style-name="ce14" office:value-type="string" calcext:value-type="string">
            <text:p>Number of discrete headings spanning 360°. Heading resolution = 2π/theta_size. Higher = finer angular grid, more memory and compu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le_goal_range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Heading tolerance for goal accep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teral_goal_range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14" office:value-type="string" calcext:value-type="string">
            <text:p>Lateral position tolerance for goal accep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gitudinal_goal_rang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Longitudinal position tolerance for goal accep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ve_weight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style-name="ce15"/>
          <table:table-cell table:number-columns-repeated="11"/>
        </table:table-row>
        <table:table-row table:style-name="ro1">
          <table:table-cell office:value-type="string" calcext:value-type="string">
            <text:p>reverse_weight</text:p>
          </table:table-cell>
          <table:table-cell table:number-columns-repeated="2" office:value-type="float" office:value="0.7" calcext:value-type="float">
            <text:p>0.7</text:p>
          </table:table-cell>
          <table:table-cell/>
          <table:table-cell table:style-name="ce14" office:value-type="string" calcext:value-type="string">
            <text:p>Move cost multiplier when driving backward: total_weight *= (1 + reverse_weight). Higher = stronger preference for forward mo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rection_change_weight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Cost added when switching forward↔backward = weight × (1 + 1 / (1 + dist_since_last_switch)). Short gear changes are penalized more heavily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Costmap configs</text:p>
          </table:table-cell>
          <table:table-cell table:style-name="ce7" table:number-columns-repeated="3"/>
          <table:table-cell table:style-name="ce13"/>
          <table:table-cell table:style-name="ce17" table:number-columns-repeated="11"/>
        </table:table-row>
        <table:table-row table:style-name="ro1">
          <table:table-cell office:value-type="string" calcext:value-type="string">
            <text:p>obstacle_threshold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Costmap cell value above which a cell is treated as an obstacle</text:p>
          </table:table-cell>
          <table:table-cell table:number-columns-repeated="10"/>
          <table:table-cell table:style-name="ce18" office:value-type="string" calcext:value-type="string">
            <text:p>Value of 100 is an issue! </text:p>
          </table:table-cell>
        </table:table-row>
        <table:table-row table:style-name="ro1">
          <table:table-cell table:number-columns-repeated="4"/>
          <table:table-cell table:style-name="ce15"/>
          <table:table-cell table:number-columns-repeated="11"/>
        </table:table-row>
        <table:table-row table:style-name="ro1">
          <table:table-cell table:style-name="ce2" office:value-type="string" calcext:value-type="string">
            <text:p>A Star</text:p>
          </table:table-cell>
          <table:table-cell table:style-name="ce6" table:number-columns-repeated="3"/>
          <table:table-cell table:style-name="ce12"/>
          <table:table-cell table:style-name="ce16" table:number-columns-repeated="11"/>
        </table:table-row>
        <table:table-row table:style-name="ro1">
          <table:table-cell office:value-type="string" calcext:value-type="string">
            <text:p>search_method</text:p>
          </table:table-cell>
          <table:table-cell table:number-columns-repeated="2" office:value-type="string" calcext:value-type="string">
            <text:p>“forward”</text:p>
          </table:table-cell>
          <table:table-cell/>
          <table:table-cell table:style-name="ce14" office:value-type="string" calcext:value-type="string">
            <text:p>"forward": search start→goal. "backward": search goal→start — sometimes produces better paths when backing into tight spa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ly_behind_solution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/>
          <table:table-cell table:style-name="ce14" office:value-type="string" calcext:value-type="string">
            <text:p>Rejects solutions where the vehicle ends up in front of the goal heading — useful for parking-into-spot scenari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_back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/>
          <table:table-cell table:style-name="ce14" office:value-type="string" calcext:value-type="string">
            <text:p>If false, reverse motion is disabled entirely (forward-only planning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_expansion_distanc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/>
          <table:table-cell table:style-name="ce14" office:value-type="string" calcext:value-type="string">
            <text:p>Dynamically scales arc length based on distance-to-goal and distance-to-obstacle. Long steps in open space, short steps near obstacles — trades off speed vs. prec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ansion_distance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Arc length of each node expansion. When adapt_expansion_distance=false this is fixed. When true, it is the minimum arc leng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ar_goal_distanc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Within this radius of the goal, goal_lat_distance_weight activates and finer goal acceptance is us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ance_heuristic_weight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Multiplier on the Reeds-Shepp heuristic. Higher = more greedy, faster but less optimal; lower = more thorough but slow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oothness_weight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Cost per unit of steering-angle change between consecutive nodes = weight × Δsteering_index / (2 × turning_steps). Higher = smoother steer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stacle_distance_weight</text:p>
          </table:table-cell>
          <table:table-cell table:number-columns-repeated="2" office:value-type="float" office:value="1.75" calcext:value-type="float">
            <text:p>1.75</text:p>
          </table:table-cell>
          <table:table-cell/>
          <table:table-cell table:style-name="ce14" office:value-type="string" calcext:value-type="string">
            <text:p>Cost proportional to proximity to obstacles (via Euclidean distance transform). Applied only within vehicle_max_dimension + clearance_buffer of an obsta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al_lat_distance_weight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Cost proportional to lateral offset from the goal when within near_goal_distance</text:p>
          </table:table-cell>
          <table:table-cell table:number-columns-repeated="11"/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7:58:30.426627450</meta:creation-date>
    <dc:date>2026-06-07T22:30:41.231337026</dc:date>
    <meta:editing-duration>P2DT3H59M30S</meta:editing-duration>
    <meta:editing-cycles>1</meta:editing-cycles>
    <meta:document-statistic meta:table-count="1" meta:cell-count="93" meta:object-count="0"/>
    <meta:generator>LibreOffice/7.3.7.2$Linux_X86_64 LibreOffice_project/30$Build-2</meta:generator>
  </office:meta>
</office:document-meta>
</file>